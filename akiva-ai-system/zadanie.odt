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kiva-ai-system/</text:p>
      <text:p text:style-name="Standard">│</text:p>
      <text:p text:style-name="Standard">├── app.py</text:p>
      <text:p text:style-name="Standard">├── ai_engine/</text:p>
      <text:p text:style-name="Standard">│ <text:s text:c="2"/>├── classifier.py</text:p>
      <text:p text:style-name="Standard">│ <text:s text:c="2"/>└── nlp.py</text:p>
      <text:p text:style-name="Standard">│</text:p>
      <text:p text:style-name="Standard">├── data/</text:p>
      <text:p text:style-name="Standard">│ <text:s text:c="2"/>├── train_data.json</text:p>
      <text:p text:style-name="Standard">│ <text:s text:c="2"/>└── logs.json</text:p>
      <text:p text:style-name="Standard">│</text:p>
      <text:p text:style-name="Standard">├── requirements.txt</text:p>
      <text:p text:style-name="Standard">└── README.md</text:p>
      <text:p text:style-name="Standard"><text:s/></text:p>
      <text:p text:style-name="Standard"><text:s/></text:p>
      <text:p text:style-name="Standard"># AI-система поддержки ООО "АКИВА"</text:p>
      <text:p text:style-name="Standard"><text:s/></text:p>
      <text:p text:style-name="Standard">## Описание</text:p>
      <text:p text:style-name="Standard">Проект разработан в рамках производственной практики.</text:p>
      <text:p text:style-name="Standard"><text:s/></text:p>
      <text:p text:style-name="Standard">Цель — внедрение искусственного интеллекта в бизнес-процессы компании.</text:p>
      <text:p text:style-name="Standard"><text:s/></text:p>
      <text:p text:style-name="Standard">## Функции</text:p>
      <text:p text:style-name="Standard">- обработка запросов пользователей</text:p>
      <text:p text:style-name="Standard">- автоматические ответы</text:p>
      <text:p text:style-name="Standard">- классификация обращений</text:p>
      <text:p text:style-name="Standard">- логирование</text:p>
      <text:p text:style-name="Standard"><text:s/></text:p>
      <text:p text:style-name="Standard">## Технологии</text:p>
      <text:p text:style-name="Standard">- Python</text:p>
      <text:p text:style-name="Standard">- Flask</text:p>
      <text:p text:style-name="Standard">- NLP (обработка текста)</text:p>
      <text:p text:style-name="Standard"><text:s/></text:p>
      <text:p text:style-name="Standard">## Запуск</text:p>
      <text:p text:style-name="Standard"><text:s/></text:p>
      <text:p text:style-name="Standard">pip install -r requirements.txt <text:s/></text:p>
      <text:p text:style-name="Standard">python app.py</text:p>
      <text:p text:style-name="Standard"><text:s/></text:p>
      <text:p text:style-name="Standard">## Пример запроса</text:p>
      <text:p text:style-name="Standard"><text:s/></text:p>
      <text:p text:style-name="Standard">POST /chat <text:s/></text:p>
      <text:p text:style-name="Standard">{</text:p>
      <text:p text:style-name="Standard"><text:s text:c="2"/>"message": "привет"</text:p>
      <text:p text:style-name="Standard">}</text:p>
      <text:p text:style-name="Standard"><text:s/></text:p>
      <text:p text:style-name="Standard">## Результат</text:p>
      <text:p text:style-name="Standard"><text:s/></text:p>
      <text:p text:style-name="Standard">{</text:p>
      <text:p text:style-name="Standard"><text:s text:c="2"/>"intent": "greeting",</text:p>
      <text:p text:style-name="Standard"><text:s text:c="2"/>"response": "Здравствуйте!"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9T10:07:37.348797771</meta:creation-date>
    <dc:date>2026-04-29T10:08:37.305493695</dc:date>
    <meta:editing-duration>PT1M</meta:editing-duration>
    <meta:editing-cycles>1</meta:editing-cycles>
    <meta:document-statistic meta:table-count="0" meta:image-count="0" meta:object-count="0" meta:page-count="1" meta:paragraph-count="51" meta:word-count="95" meta:character-count="670" meta:non-whitespace-character-count="583"/>
    <meta:generator>LibreOffice/25.8.6.2$Linux_X86_64 LibreOffice_project/580$Build-2</meta:generator>
  </office:meta>
</office:document-meta>
</file>